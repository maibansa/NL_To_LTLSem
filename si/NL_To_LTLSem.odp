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58" svg:stroke-width="0in" svg:stroke-color="#3465a4" draw:marker-end="a65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64" draw:stroke="dash" draw:stroke-dash="a665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29" svg:stroke-width="0in" svg:stroke-color="#3465a4" draw:marker-end="a63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68" draw:stroke="dash" draw:stroke-dash="a569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6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34" svg:stroke-width="0in" svg:stroke-color="#3465a4" draw:marker-end="a63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666666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666666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dash" draw:stroke-dash="a573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04" draw:stroke="dash" draw:stroke-dash="a605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0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38" draw:stroke="dash" draw:stroke-dash="a539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77" draw:stroke="dash" draw:stroke-dash="a578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43" draw:stroke="dash" draw:stroke-dash="a544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69" svg:stroke-width="0in" svg:stroke-color="#3465a4" draw:marker-end="a67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39" draw:stroke="dash" draw:stroke-dash="a640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44" svg:stroke-width="0in" svg:stroke-color="#3465a4" draw:marker-end="a64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09" draw:stroke="dash" draw:stroke-dash="a610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4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582" svg:stroke-width="0in" svg:stroke-color="#3465a4" draw:marker-end="a5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48" draw:stroke="dash" draw:stroke-dash="a549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14" svg:stroke-width="0in" svg:stroke-color="#3465a4" draw:marker-end="a61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587" svg:stroke-width="0in" svg:stroke-color="#3465a4" draw:marker-end="a58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55" draw:stroke="dash" draw:stroke-dash="a556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49" svg:stroke-width="0in" svg:stroke-color="#3465a4" draw:marker-end="a6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619" draw:stroke="dash" draw:stroke-dash="a620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592" svg:stroke-width="0in" svg:stroke-color="#3465a4" draw:marker-end="a59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624" svg:stroke-width="0in" svg:stroke-color="#3465a4" draw:marker-end="a62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597" svg:stroke-width="0in" svg:stroke-color="#3465a4" draw:marker-end="a59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middle" draw:textarea-horizontal-align="center" draw:fill="gradient" draw:fill-gradient-name="a560" draw:stroke="dash" draw:stroke-dash="a561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5" draw:master-page-name="Master1-Layout7-blank-En-blanco" presentation:presentation-page-layout-name="Master1-PPL7" draw:id="Slide-256">
        <draw:custom-shape svg:x="4.15709in" svg:y="1.59122in" svg:width="5.59028in" svg:height="2.16535in" draw:id="id73" draw:style-name="a540" draw:name="Forma libre: forma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3222in" svg:y="2.28346in" svg:width="1.1811in" svg:height="0.59055in" draw:id="id74" draw:style-name="a545" draw:name="Forma libre: forma 2">
          <svg:title/>
          <svg:desc/>
          <text:p text:style-name="a542" text:class-names="" text:cond-style-name=""><text:span text:style-name="a541" text:class-names="">Semantic Integr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9606in" svg:y="2.87402in" svg:width="1.1811in" svg:height="0.59055in" draw:id="id75" draw:style-name="a550" draw:name="Forma libre: forma 3">
          <svg:title/>
          <svg:desc/>
          <text:p text:style-name="a547" text:class-names="" text:cond-style-name=""><text:span text:style-name="a546" text:class-names="">Ontological Grounding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0352in" svg:y="1.86478in" svg:width="1.27647in" svg:height="0.59055in" draw:id="id76" draw:style-name="a557" draw:name="Forma libre: forma 4">
          <svg:title/>
          <svg:desc/>
          <text:p text:style-name="a554" text:class-names="" text:cond-style-name=""><text:span text:style-name="a551" text:class-names="">Semantic – Temporal<text:s text:c="1"/></text:span><text:span text:style-name="a552" text:class-names="">Descomposition</text:span><text:span text:style-name="a5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45936in" svg:y="4.0075in" svg:width="1.1811in" svg:height="0.59055in" draw:id="id77" draw:style-name="a562" draw:name="Forma libre: forma 6">
          <svg:title/>
          <svg:desc/>
          <text:p text:style-name="a559" text:class-names="" text:cond-style-name=""><text:span text:style-name="a558" text:class-names="">SNOMED API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1927in" svg:y="2.87402in" svg:width="1.1811in" svg:height="0.59055in" draw:id="id78" draw:style-name="a570" draw:name="Forma libre: forma 8">
          <svg:title/>
          <svg:desc/>
          <text:p text:style-name="a567" text:class-names="" text:cond-style-name=""><text:span text:style-name="a563" text:class-names="">O</text:span><text:span text:style-name="a564" text:class-names="">ntology</text:span><text:span text:style-name="a565" text:class-names=""><text:s text:c="1"/></text:span><text:span text:style-name="a566" text:class-names="">load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8949in" svg:y="0.95103in" svg:width="1.1811in" svg:height="0.59055in" draw:id="id79" draw:style-name="a574" draw:name="Forma libre: forma 9">
          <svg:title/>
          <svg:desc/>
          <text:p text:style-name="a572" text:class-names="" text:cond-style-name=""><text:span text:style-name="a571" text:class-names="">UI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8949in" svg:y="1.85654in" svg:width="1.1811in" svg:height="0.59055in" draw:id="id80" draw:style-name="a579" draw:name="Forma libre: forma 10">
          <svg:title/>
          <svg:desc/>
          <text:p text:style-name="a576" text:class-names="" text:cond-style-name=""><text:span text:style-name="a575" text:class-names="">NL sentenc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8004in" svg:y="1.54158in" svg:width="0in" svg:height="0.31496in" draw:id="id81" draw:style-name="a584" draw:name="Conector recto 11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87059in" svg:y="2.13213in" svg:width="0.43307in" svg:height="0in" draw:id="id82" draw:style-name="a589" draw:name="Conector recto 12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1215in" svg:y="3.14961in" svg:width="0.98391in" svg:height="0in" draw:id="id83" draw:style-name="a594" draw:name="Conector recto 13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5118in" svg:y="2.44709in" svg:width="0.94488in" svg:height="0.42692in" draw:id="id84" draw:style-name="a599" draw:name="Conector recto 14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59198in" svg:y="2.90576in" svg:width="1.1811in" svg:height="0.7874in" draw:id="id85" draw:style-name="a606" draw:name="Forma libre: forma 18">
          <svg:title/>
          <svg:desc/>
          <text:p text:style-name="a603" text:class-names="" text:cond-style-name=""><text:span text:style-name="a600" text:class-names="">Log<text:s text:c="1"/></text:span><text:span text:style-name="a601" text:class-names="">DataBase</text:span><text:span text:style-name="a602" text:class-names=""/></text:p>
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88"/>
            <draw:equation draw:name="f6" draw:formula="21600"/>
            <draw:equation draw:name="f7" draw:formula="44"/>
            <draw:equation draw:name="f8" draw:formula="10800"/>
            <draw:equation draw:name="f9" draw:formula="20"/>
            <draw:equation draw:name="f10" draw:formula="68"/>
            <draw:equation draw:name="f11" draw:formula="?f6 - ?f4"/>
            <draw:equation draw:name="f12" draw:formula="?f5 - ?f4"/>
            <draw:equation draw:name="f13" draw:formula="$0"/>
            <draw:equation draw:name="f14" draw:formula="?f12 / 88"/>
            <draw:equation draw:name="f15" draw:formula="?f11 / 21600"/>
            <draw:equation draw:name="f16" draw:formula="?f13 * 2"/>
            <draw:equation draw:name="f17" draw:formula="0 * ?f14"/>
            <draw:equation draw:name="f18" draw:formula="88 * ?f14"/>
            <draw:equation draw:name="f19" draw:formula="44 * ?f14"/>
            <draw:equation draw:name="f20" draw:formula="0 * ?f15"/>
            <draw:equation draw:name="f21" draw:formula="10800 * ?f15"/>
            <draw:equation draw:name="f22" draw:formula="21600 * ?f15"/>
            <draw:equation draw:name="f23" draw:formula="?f16 / 4"/>
            <draw:equation draw:name="f24" draw:formula="?f19 / ?f14"/>
            <draw:equation draw:name="f25" draw:formula="?f20 / ?f15"/>
            <draw:equation draw:name="f26" draw:formula="?f17 / ?f14"/>
            <draw:equation draw:name="f27" draw:formula="?f21 / ?f15"/>
            <draw:equation draw:name="f28" draw:formula="?f22 / ?f15"/>
            <draw:equation draw:name="f29" draw:formula="?f18 / ?f14"/>
            <draw:equation draw:name="f30" draw:formula="?f23 * 6"/>
            <draw:equation draw:name="f31" draw:formula="21600 - ?f23"/>
            <draw:equation draw:name="f32" draw:formula="?f30 / 11"/>
            <draw:equation draw:name="f33" draw:formula="?f23 - ?f32"/>
            <draw:equation draw:name="f34" draw:formula="?f31 + ?f32"/>
            <draw:equation draw:name="f35" draw:formula="?f23 + ?f32"/>
            <draw:equation draw:name="f36" draw:formula="$0 / ?f3"/>
            <draw:handle draw:handle-position="?f24 $0" draw:handle-position-x="?f24" draw:handle-position-y="$0" draw:handle-range-y-minimum="0" draw:handle-range-y-maximum="10800"/>
          </draw:enhanced-geometry>
        </draw:custom-shape>
        <draw:custom-shape svg:x="6.42133in" svg:y="1.83071in" svg:width="1.37795in" svg:height="0.59055in" draw:id="id86" draw:style-name="a611" draw:name="Forma libre: forma 24">
          <svg:title/>
          <svg:desc/>
          <text:p text:style-name="a608" text:class-names="" text:cond-style-name=""><text:span text:style-name="a607" text:class-names="">Temporal Structure Synthesi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8911in" svg:y="2.80142in" svg:width="0.54311in" svg:height="0.42692in" draw:id="id87" draw:style-name="a616" draw:name="Conector recto 29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24043in" svg:y="4.36797in" svg:width="1.71895in" svg:height="0.75907in" draw:id="id88" draw:style-name="a621" draw:name="Forma libre: forma 30">
          <svg:title/>
          <svg:desc/>
          <text:p text:style-name="a618" text:class-names="" text:cond-style-name=""><text:span text:style-name="a617" text:class-names="">LTL Model Chek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7308in" svg:y="3.14961in" svg:width="0.597in" svg:height="0.14986in" draw:id="id89" draw:style-name="a626" draw:name="Conector recto 34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8in" svg:y="2.13213in" svg:width="0.85382in" svg:height="0in" draw:id="id90" draw:style-name="a631" draw:name="Conector recto 35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79928in" svg:y="2.13213in" svg:width="0.43293in" svg:height="0.2618in" draw:id="id91" draw:style-name="a636" draw:name="Conector recto 36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44278in" svg:y="3.39789in" svg:width="1.1811in" svg:height="0.59055in" draw:id="id92" draw:style-name="a641" draw:name="Forma libre: forma 37">
          <svg:title/>
          <svg:desc/>
          <text:p text:style-name="a638" text:class-names="" text:cond-style-name=""><text:span text:style-name="a637" text:class-names="">LTL Formul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86207in" svg:y="2.90576in" svg:width="0.13576in" svg:height="0.49213in" draw:id="id93" draw:style-name="a646" draw:name="Conector recto 3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9.0668in" svg:y="3.98844in" svg:width="0in" svg:height="0.37954in" draw:id="id94" draw:style-name="a651" draw:name="Conector recto 39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5" draw:style-name="a655" draw:name="CuadroTexto 26" svg:x="6.17348in" svg:y="1.63409in" svg:width="5.51293in" svg:height="0.33659in">
          <draw:text-box>
            <text:p text:style-name="a654" text:class-names="" text:cond-style-name=""><text:span text:style-name="a652" text:class-names="">NL to LTL Sem</text:span><text:span text:style-name="a653" text:class-names=""/></text:p>
          </draw:text-box>
          <svg:title/>
          <svg:desc/>
        </draw:frame>
        <draw:custom-shape svg:x="4.95948in" svg:y="3.45632in" svg:width="0.075in" svg:height="0.59055in" draw:id="id96" draw:style-name="a660" draw:name="Conector recto 1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36893in" svg:y="0.39253in" svg:width="1.1811in" svg:height="0.7874in" draw:id="id97" draw:style-name="a666" draw:name="Forma libre: forma 18">
          <svg:title/>
          <svg:desc/>
          <text:p text:style-name="a663" text:class-names="" text:cond-style-name=""><text:span text:style-name="a661" text:class-names="">log.mod</text:span><text:span text:style-name="a662" text:class-names=""/></text:p>
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88"/>
            <draw:equation draw:name="f6" draw:formula="21600"/>
            <draw:equation draw:name="f7" draw:formula="44"/>
            <draw:equation draw:name="f8" draw:formula="10800"/>
            <draw:equation draw:name="f9" draw:formula="20"/>
            <draw:equation draw:name="f10" draw:formula="68"/>
            <draw:equation draw:name="f11" draw:formula="?f6 - ?f4"/>
            <draw:equation draw:name="f12" draw:formula="?f5 - ?f4"/>
            <draw:equation draw:name="f13" draw:formula="$0"/>
            <draw:equation draw:name="f14" draw:formula="?f12 / 88"/>
            <draw:equation draw:name="f15" draw:formula="?f11 / 21600"/>
            <draw:equation draw:name="f16" draw:formula="?f13 * 2"/>
            <draw:equation draw:name="f17" draw:formula="0 * ?f14"/>
            <draw:equation draw:name="f18" draw:formula="88 * ?f14"/>
            <draw:equation draw:name="f19" draw:formula="44 * ?f14"/>
            <draw:equation draw:name="f20" draw:formula="0 * ?f15"/>
            <draw:equation draw:name="f21" draw:formula="10800 * ?f15"/>
            <draw:equation draw:name="f22" draw:formula="21600 * ?f15"/>
            <draw:equation draw:name="f23" draw:formula="?f16 / 4"/>
            <draw:equation draw:name="f24" draw:formula="?f19 / ?f14"/>
            <draw:equation draw:name="f25" draw:formula="?f20 / ?f15"/>
            <draw:equation draw:name="f26" draw:formula="?f17 / ?f14"/>
            <draw:equation draw:name="f27" draw:formula="?f21 / ?f15"/>
            <draw:equation draw:name="f28" draw:formula="?f22 / ?f15"/>
            <draw:equation draw:name="f29" draw:formula="?f18 / ?f14"/>
            <draw:equation draw:name="f30" draw:formula="?f23 * 6"/>
            <draw:equation draw:name="f31" draw:formula="21600 - ?f23"/>
            <draw:equation draw:name="f32" draw:formula="?f30 / 11"/>
            <draw:equation draw:name="f33" draw:formula="?f23 - ?f32"/>
            <draw:equation draw:name="f34" draw:formula="?f31 + ?f32"/>
            <draw:equation draw:name="f35" draw:formula="?f23 + ?f32"/>
            <draw:equation draw:name="f36" draw:formula="$0 / ?f3"/>
            <draw:handle draw:handle-position="?f24 $0" draw:handle-position-x="?f24" draw:handle-position-y="$0" draw:handle-range-y-minimum="0" draw:handle-range-y-maximum="10800"/>
          </draw:enhanced-geometry>
        </draw:custom-shape>
        <draw:custom-shape svg:x="4.90948in" svg:y="1.20491in" svg:width="0.05in" svg:height="0.65986in" draw:id="id98" draw:style-name="a671" draw:name="Conector recto 15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677">
          <draw:frame draw:id="id99" draw:style-name="a674" draw:name="Marcador de número de diapositiva 6" svg:x="4.67953in" svg:y="11.10827in" svg:width="3.5878in" svg:height="0.58425in">
            <draw:text-box>
              <text:p text:style-name="a673" text:class-names="" text:cond-style-name=""><text:span text:style-name="a67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0" presentation:style-name="a675" draw:name="Marcador de imagen de diapositiva 1">
            <svg:title/>
            <svg:desc/>
          </draw:page-thumbnail>
          <draw:frame draw:id="id101" presentation:style-name="a67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y objetos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os objeto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el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n bl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y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ítulo vertical y texto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64" draw:style="linear" draw:angle="0" draw:start-color="#dde8cb" draw:end-color="#b4c7dc" draw:start-intensity="100%" draw:end-intensity="100%"/>
    <draw:gradient draw:name="a543" draw:style="linear" draw:angle="0" draw:start-color="#dde8cb" draw:end-color="#b4c7dc" draw:start-intensity="100%" draw:end-intensity="100%"/>
    <draw:gradient draw:name="a604" draw:style="linear" draw:angle="0" draw:start-color="#dde8cb" draw:end-color="#b4c7dc" draw:start-intensity="100%" draw:end-intensity="100%"/>
    <draw:gradient draw:name="a538" draw:style="linear" draw:angle="0" draw:start-color="#dde8cb" draw:end-color="#b4c7dc" draw:start-intensity="100%" draw:end-intensity="100%"/>
    <draw:gradient draw:name="a548" draw:style="linear" draw:angle="0" draw:start-color="#dde8cb" draw:end-color="#b4c7dc" draw:start-intensity="100%" draw:end-intensity="100%"/>
    <draw:gradient draw:name="a560" draw:style="linear" draw:angle="0" draw:start-color="#dde8cb" draw:end-color="#b4c7dc" draw:start-intensity="100%" draw:end-intensity="100%"/>
    <draw:gradient draw:name="a609" draw:style="linear" draw:angle="0" draw:start-color="#dde8cb" draw:end-color="#b4c7dc" draw:start-intensity="100%" draw:end-intensity="100%"/>
    <draw:gradient draw:name="a555" draw:style="linear" draw:angle="0" draw:start-color="#dde8cb" draw:end-color="#b4c7dc" draw:start-intensity="100%" draw:end-intensity="100%"/>
    <draw:gradient draw:name="a619" draw:style="linear" draw:angle="0" draw:start-color="#dde8cb" draw:end-color="#b4c7dc" draw:start-intensity="100%" draw:end-intensity="100%"/>
    <draw:gradient draw:name="a568" draw:style="linear" draw:angle="0" draw:start-color="#dde8cb" draw:end-color="#b4c7dc" draw:start-intensity="100%" draw:end-intensity="100%"/>
    <draw:gradient draw:name="a577" draw:style="linear" draw:angle="0" draw:start-color="#dde8cb" draw:end-color="#b4c7dc" draw:start-intensity="100%" draw:end-intensity="100%"/>
    <draw:gradient draw:name="a639" draw:style="linear" draw:angle="0" draw:start-color="#dde8cb" draw:end-color="#b4c7dc" draw:start-intensity="100%" draw:end-intensity="100%"/>
    <draw:marker draw:name="a598" svg:viewBox="0 0 20 30" svg:d="m10 0-10 30h20z"/>
    <draw:marker draw:name="a670" svg:viewBox="0 0 20 30" svg:d="m10 0-10 30h20z"/>
    <draw:marker draw:name="a659" svg:viewBox="0 0 20 30" svg:d="m10 0-10 30h20z"/>
    <draw:marker draw:name="a615" svg:viewBox="0 0 20 30" svg:d="m10 0-10 30h20z"/>
    <draw:marker draw:name="a630" svg:viewBox="0 0 20 30" svg:d="m10 0-10 30h20z"/>
    <draw:marker draw:name="a625" svg:viewBox="0 0 20 30" svg:d="m10 0-10 30h20z"/>
    <draw:marker draw:name="a635" svg:viewBox="0 0 20 30" svg:d="m10 0-10 30h20z"/>
    <draw:marker draw:name="a583" svg:viewBox="0 0 20 30" svg:d="m10 0-10 30h20z"/>
    <draw:marker draw:name="a650" svg:viewBox="0 0 20 30" svg:d="m10 0-10 30h20z"/>
    <draw:marker draw:name="a645" svg:viewBox="0 0 20 30" svg:d="m10 0-10 30h20z"/>
    <draw:marker draw:name="a593" svg:viewBox="0 0 20 30" svg:d="m10 0-10 30h20z"/>
    <draw:marker draw:name="a588" svg:viewBox="0 0 20 30" svg:d="m10 0-10 30h20z"/>
    <draw:stroke-dash draw:name="a649" draw:style="rect" draw:dots1="1" draw:dots1-length="0in" draw:distance="0in"/>
    <draw:stroke-dash draw:name="a561" draw:style="rect" draw:dots1="1" draw:dots1-length="0in" draw:distance="0in"/>
    <draw:stroke-dash draw:name="a634" draw:style="rect" draw:dots1="1" draw:dots1-length="0in" draw:distance="0in"/>
    <draw:stroke-dash draw:name="a569" draw:style="rect" draw:dots1="1" draw:dots1-length="0in" draw:distance="0in"/>
    <draw:stroke-dash draw:name="a620" draw:style="rect" draw:dots1="1" draw:dots1-length="0in" draw:distance="0in"/>
    <draw:stroke-dash draw:name="a592" draw:style="rect" draw:dots1="1" draw:dots1-length="0in" draw:distance="0in"/>
    <draw:stroke-dash draw:name="a624" draw:style="rect" draw:dots1="1" draw:dots1-length="0in" draw:distance="0in"/>
    <draw:stroke-dash draw:name="a556" draw:style="rect" draw:dots1="1" draw:dots1-length="0in" draw:distance="0in"/>
    <draw:stroke-dash draw:name="a665" draw:style="rect" draw:dots1="1" draw:dots1-length="0in" draw:distance="0in"/>
    <draw:stroke-dash draw:name="a597" draw:style="rect" draw:dots1="1" draw:dots1-length="0in" draw:distance="0in"/>
    <draw:stroke-dash draw:name="a629" draw:style="rect" draw:dots1="1" draw:dots1-length="0in" draw:distance="0in"/>
    <draw:stroke-dash draw:name="a610" draw:style="rect" draw:dots1="1" draw:dots1-length="0in" draw:distance="0in"/>
    <draw:stroke-dash draw:name="a669" draw:style="rect" draw:dots1="1" draw:dots1-length="0in" draw:distance="0in"/>
    <draw:stroke-dash draw:name="a544" draw:style="rect" draw:dots1="1" draw:dots1-length="0in" draw:distance="0in"/>
    <draw:stroke-dash draw:name="a614" draw:style="rect" draw:dots1="1" draw:dots1-length="0in" draw:distance="0in"/>
    <draw:stroke-dash draw:name="a582" draw:style="rect" draw:dots1="1" draw:dots1-length="0in" draw:distance="0in"/>
    <draw:stroke-dash draw:name="a549" draw:style="rect" draw:dots1="1" draw:dots1-length="0in" draw:distance="0in"/>
    <draw:stroke-dash draw:name="a587" draw:style="rect" draw:dots1="1" draw:dots1-length="0in" draw:distance="0in"/>
    <draw:stroke-dash draw:name="a658" draw:style="rect" draw:dots1="1" draw:dots1-length="0in" draw:distance="0in"/>
    <draw:stroke-dash draw:name="a640" draw:style="rect" draw:dots1="1" draw:dots1-length="0in" draw:distance="0in"/>
    <draw:stroke-dash draw:name="a605" draw:style="rect" draw:dots1="1" draw:dots1-length="0in" draw:distance="0in"/>
    <draw:stroke-dash draw:name="a573" draw:style="rect" draw:dots1="1" draw:dots1-length="0in" draw:distance="0in"/>
    <draw:stroke-dash draw:name="a644" draw:style="rect" draw:dots1="1" draw:dots1-length="0in" draw:distance="0in"/>
    <draw:stroke-dash draw:name="a539" draw:style="rect" draw:dots1="1" draw:dots1-length="0in" draw:distance="0in"/>
    <draw:stroke-dash draw:name="a578" draw:style="rect" draw:dots1="1" draw:dots1-length="0in" draw:distance="0in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Marcador de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0" draw:name="Título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2" presentation:style-name="a53" draw:name="Subtítulo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Haga clic para modificar el estilo de subtítulo del patrón</text:span></text:p>
        </draw:text-box>
        <svg:title/>
        <svg:desc/>
      </draw:frame>
      <draw:frame draw:id="id13" presentation:style-name="a56" draw:name="Marcador de fecha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Marcador de pie de página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Marcador de número de diapositiva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Marcador de imagen de diapositiva 1">
          <svg:title/>
          <svg:desc/>
        </draw:page-thumbnail>
        <draw:frame draw:id="id6" presentation:style-name="a66" draw:name="Marcador de notas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Marcador de encabezado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Marcador de fecha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Marcador de pie de página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Marcador de número de diapositiva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0">
      <draw:frame draw:id="id16" presentation:style-name="a83" draw:name="Título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Haga clic para modificar el estilo de título del patrón</text:span></text:p>
        </draw:text-box>
        <svg:title/>
        <svg:desc/>
      </draw:frame>
      <draw:frame draw:id="id17" presentation:style-name="a98" draw:name="Marcador de contenido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Haga clic para modificar los estilos de texto del patrón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gundo ni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Marcador de fecha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Marcador de pie de página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Marcador de número de diapositiva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Marcador de imagen de diapositiva 1">
          <svg:title/>
          <svg:desc/>
        </draw:page-thumbnail>
        <draw:frame draw:id="id6" presentation:style-name="a111" draw:name="Marcador de notas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Marcador de encabezado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Marcador de fecha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Marcador de pie de página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Marcador de número de diapositiva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5">
      <draw:frame draw:id="id21" presentation:style-name="a128" draw:name="Título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Haga clic para modificar el estilo de título del patrón</text:span></text:p>
        </draw:text-box>
        <svg:title/>
        <svg:desc/>
      </draw:frame>
      <draw:frame draw:id="id22" presentation:style-name="a132" draw:name="Marcador de texto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5" draw:name="Marcador de fecha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Marcador de pie de página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Marcador de número de diapositiva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Marcador de imagen de diapositiva 1">
          <svg:title/>
          <svg:desc/>
        </draw:page-thumbnail>
        <draw:frame draw:id="id6" presentation:style-name="a145" draw:name="Marcador de notas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Marcador de encabezado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Marcador de fecha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Marcador de pie de página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Marcador de número de diapositiva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9">
      <draw:frame draw:id="id26" presentation:style-name="a162" draw:name="Título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Haga clic para modificar el estilo de título del patrón</text:span></text:p>
        </draw:text-box>
        <svg:title/>
        <svg:desc/>
      </draw:frame>
      <draw:frame draw:id="id27" presentation:style-name="a177" draw:name="Marcador de contenido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Haga clic para modificar los estilos de texto del patrón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gundo ni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Marcador de contenido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Haga clic para modificar los estilos de texto del patrón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gundo ni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Marcador de fecha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Marcador de pie de página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Marcador de número de diapositiva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Marcador de imagen de diapositiva 1">
          <svg:title/>
          <svg:desc/>
        </draw:page-thumbnail>
        <draw:frame draw:id="id6" presentation:style-name="a205" draw:name="Marcador de notas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Marcador de encabezado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Marcador de fecha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Marcador de pie de página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Marcador de número de diapositiva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9">
      <draw:frame draw:id="id32" presentation:style-name="a222" draw:name="Título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Haga clic para modificar el estilo de título del patrón</text:span></text:p>
        </draw:text-box>
        <svg:title/>
        <svg:desc/>
      </draw:frame>
      <draw:frame draw:id="id33" presentation:style-name="a226" draw:name="Marcador de texto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1" draw:name="Marcador de contenido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Haga clic para modificar los estilos de texto del patrón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gundo ni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Marcador de texto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0" draw:name="Marcador de contenido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Haga clic para modificar los estilos de texto del patró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i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Marcador de fecha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Marcador de pie de página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Marcador de número de diapositiva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Marcador de imagen de diapositiva 1">
          <svg:title/>
          <svg:desc/>
        </draw:page-thumbnail>
        <draw:frame draw:id="id6" presentation:style-name="a273" draw:name="Marcador de notas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Marcador de encabezado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Marcador de fecha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Marcador de pie de página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Marcador de número de diapositiva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7">
      <draw:frame draw:id="id40" presentation:style-name="a290" draw:name="Título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Haga clic para modificar el estilo de título del patrón</text:span></text:p>
        </draw:text-box>
        <svg:title/>
        <svg:desc/>
      </draw:frame>
      <draw:frame draw:id="id41" presentation:style-name="a293" draw:name="Marcador de fecha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Marcador de pie de página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Marcador de número de diapositiva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Marcador de imagen de diapositiva 1">
          <svg:title/>
          <svg:desc/>
        </draw:page-thumbnail>
        <draw:frame draw:id="id6" presentation:style-name="a303" draw:name="Marcador de notas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Marcador de encabezado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Marcador de fecha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Marcador de pie de página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Marcador de número de diapositiva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7">
      <draw:frame draw:id="id44" presentation:style-name="a320" draw:name="Marcador de fecha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Marcador de pie de página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Marcador de número de diapositiva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Marcador de imagen de diapositiva 1">
          <svg:title/>
          <svg:desc/>
        </draw:page-thumbnail>
        <draw:frame draw:id="id6" presentation:style-name="a330" draw:name="Marcador de notas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Marcador de encabezado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Marcador de fecha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Marcador de pie de página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Marcador de número de diapositiva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4">
      <draw:frame draw:id="id47" presentation:style-name="a347" draw:name="Título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Haga clic para modificar el estilo de título del patrón</text:span></text:p>
        </draw:text-box>
        <svg:title/>
        <svg:desc/>
      </draw:frame>
      <draw:frame draw:id="id48" presentation:style-name="a362" draw:name="Marcador de contenido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Haga clic para modificar los estilos de texto del patrón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gundo ni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6" draw:name="Título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Haga clic para modificar el estilo de título del patrón</text:span></text:p>
        </draw:text-box>
        <svg:title/>
        <svg:desc/>
      </draw:frame>
      <draw:frame draw:id="id54" presentation:style-name="a399" draw:name="Marcador de posición de imagen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Marcador de texto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06" draw:name="Marcador de fecha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Marcador de pie de página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Marcador de número de diapositiva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Marcador de imagen de diapositiva 1">
          <svg:title/>
          <svg:desc/>
        </draw:page-thumbnail>
        <draw:frame draw:id="id6" presentation:style-name="a416" draw:name="Marcador de notas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Marcador de encabezado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Marcador de fecha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Marcador de pie de página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Marcador de número de diapositiva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0">
      <draw:frame draw:id="id59" presentation:style-name="a433" draw:name="Título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Haga clic para modificar el estilo de título del patrón</text:span></text:p>
        </draw:text-box>
        <svg:title/>
        <svg:desc/>
      </draw:frame>
      <draw:frame draw:id="id60" presentation:style-name="a449" draw:name="Marcador de texto vertical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Haga clic para modificar los estilos de texto del patrón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gundo ni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Marcador de fecha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Marcador de pie de página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Marcador de número de diapositiva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Marcador de imagen de diapositiva 1">
          <svg:title/>
          <svg:desc/>
        </draw:page-thumbnail>
        <draw:frame draw:id="id6" presentation:style-name="a462" draw:name="Marcador de notas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Marcador de encabezado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Marcador de fecha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Marcador de pie de página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Marcador de número de diapositiva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6">
      <draw:frame draw:id="id64" presentation:style-name="a479" draw:name="Título vertical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Haga clic para modificar el estilo de título del patrón</text:span></text:p>
        </draw:text-box>
        <svg:title/>
        <svg:desc/>
      </draw:frame>
      <draw:frame draw:id="id65" presentation:style-name="a495" draw:name="Marcador de texto vertical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Haga clic para modificar los estilos de texto del patrón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gundo ni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Marcador de fecha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Marcador de pie de página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Marcador de número de diapositiva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Marcador de imagen de diapositiva 1">
          <svg:title/>
          <svg:desc/>
        </draw:page-thumbnail>
        <draw:frame draw:id="id6" presentation:style-name="a508" draw:name="Marcador de notas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Marcador de encabezado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Marcador de fecha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Marcador de pie de página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Marcador de número de diapositiva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Marcador de encabezado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Marcador de fecha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Marcador de pie de página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Marcador de número de diapositiva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initial-creator>MariJose</meta:initial-creator>
    <dc:creator>María José Ibáñez Sáenz-López</dc:creator>
    <meta:creation-date>2026-03-26T10:55:10Z</meta:creation-date>
    <dc:date>2026-04-22T10:34:54Z</dc:date>
    <meta:editing-cycles>14</meta:editing-cycles>
    <meta:editing-duration>PT8880S</meta:editing-duration>
    <meta:document-statistic meta:paragraph-count="14" meta:word-count="33"/>
  </office:meta>
</office:document-meta>
</file>