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658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56" draw:stroke="dash" draw:stroke-dash="a657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02" draw:stroke="dash" draw:stroke-dash="a603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07" svg:stroke-width="0in" svg:stroke-color="#3465a4" draw:marker-end="a60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72" draw:stroke="dash" draw:stroke-dash="a573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577" svg:stroke-width="0in" svg:stroke-color="#3465a4" draw:marker-end="a57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61" svg:stroke-width="0in" svg:stroke-color="#3465a4" draw:marker-end="a66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67" draw:stroke="dash" draw:stroke-dash="a668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12" draw:stroke="dash" draw:stroke-dash="a613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17" svg:stroke-width="0in" svg:stroke-color="#3465a4" draw:marker-end="a61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4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582" svg:stroke-width="0in" svg:stroke-color="#3465a4" draw:marker-end="a5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587" svg:stroke-width="0in" svg:stroke-color="#3465a4" draw:marker-end="a58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1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99" svg:stroke-width="0in" svg:stroke-color="#3465a4" draw:marker-end="a7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705" draw:stroke="dash" draw:stroke-dash="a706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73" draw:stroke="dash" draw:stroke-dash="a674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22" svg:stroke-width="0in" svg:stroke-color="#3465a4" draw:marker-end="a62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27" svg:stroke-width="0in" svg:stroke-color="#3465a4" draw:marker-end="a62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592" svg:stroke-width="0in" svg:stroke-color="#3465a4" draw:marker-end="a59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38" draw:stroke="dash" draw:stroke-dash="a539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97" draw:stroke="dash" draw:stroke-dash="a598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43" draw:stroke="dash" draw:stroke-dash="a544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2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710" svg:stroke-width="0in" svg:stroke-color="#3465a4" draw:marker-end="a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solid" draw:fill-color="#729fcf" draw:opacity="100%" draw:stroke="solid" svg:stroke-width="0.02778in" svg:stroke-color="#3465a4" svg:stroke-opacity="100%"/>
    </style:style>
    <style:style style:family="graphic" style:name="a680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78" svg:stroke-width="0in" svg:stroke-color="#3465a4" draw:marker-end="a67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83" svg:stroke-width="0in" svg:stroke-color="#3465a4" draw:marker-end="a68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32" draw:stroke="dash" draw:stroke-dash="a633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37" svg:stroke-width="0in" svg:stroke-color="#3465a4" draw:marker-end="a63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0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48" draw:stroke="dash" draw:stroke-dash="a549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53" draw:stroke="dash" draw:stroke-dash="a554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89" draw:stroke="dash" draw:stroke-dash="a690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94" svg:stroke-width="0in" svg:stroke-color="#3465a4" draw:marker-end="a6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42" svg:stroke-width="0in" svg:stroke-color="#3465a4" draw:marker-end="a64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58" draw:stroke="dash" draw:stroke-dash="a559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63" draw:stroke="dash" draw:stroke-dash="a564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666666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666666"/>
    </style:style>
    <style:style style:family="graphic" style:name="a5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dash" draw:stroke-dash="a568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51" svg:stroke-width="0in" svg:stroke-color="#3465a4" draw:marker-end="a65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5" draw:master-page-name="Master1-Layout7-blank-En-blanco" presentation:presentation-page-layout-name="Master1-PPL7" draw:id="Slide-256">
        <draw:custom-shape svg:x="4.15709in" svg:y="1.59122in" svg:width="5.59028in" svg:height="2.16535in" draw:id="id73" draw:style-name="a540" draw:name="Forma libre: forma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3222in" svg:y="2.28346in" svg:width="1.1811in" svg:height="0.59055in" draw:id="id74" draw:style-name="a545" draw:name="Forma libre: forma 2">
          <svg:title/>
          <svg:desc/>
          <text:p text:style-name="a542" text:class-names="" text:cond-style-name=""><text:span text:style-name="a541" text:class-names="">Semantic Integr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9606in" svg:y="2.87402in" svg:width="1.1811in" svg:height="0.59055in" draw:id="id75" draw:style-name="a550" draw:name="Forma libre: forma 3">
          <svg:title/>
          <svg:desc/>
          <text:p text:style-name="a547" text:class-names="" text:cond-style-name=""><text:span text:style-name="a546" text:class-names="">Ontological Grounding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0352in" svg:y="1.86478in" svg:width="1.27647in" svg:height="0.59055in" draw:id="id76" draw:style-name="a555" draw:name="Forma libre: forma 4">
          <svg:title/>
          <svg:desc/>
          <text:p text:style-name="a552" text:class-names="" text:cond-style-name=""><text:span text:style-name="a551" text:class-names="">Semantic – Temporal Descomposi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45936in" svg:y="4.0075in" svg:width="1.1811in" svg:height="0.59055in" draw:id="id77" draw:style-name="a560" draw:name="Forma libre: forma 6">
          <svg:title/>
          <svg:desc/>
          <text:p text:style-name="a557" text:class-names="" text:cond-style-name=""><text:span text:style-name="a556" text:class-names="">SNOMED API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1927in" svg:y="2.87402in" svg:width="1.1811in" svg:height="0.59055in" draw:id="id78" draw:style-name="a565" draw:name="Forma libre: forma 8">
          <svg:title/>
          <svg:desc/>
          <text:p text:style-name="a562" text:class-names="" text:cond-style-name=""><text:span text:style-name="a561" text:class-names="">Ontology load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22189in" svg:y="1.86478in" svg:width="1.1811in" svg:height="0.59055in" draw:id="id79" draw:style-name="a569" draw:name="Forma libre: forma 9">
          <svg:title/>
          <svg:desc/>
          <text:p text:style-name="a567" text:class-names="" text:cond-style-name=""><text:span text:style-name="a566" text:class-names="">UI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8949in" svg:y="1.85654in" svg:width="1.1811in" svg:height="0.59055in" draw:id="id80" draw:style-name="a574" draw:name="Forma libre: forma 10">
          <svg:title/>
          <svg:desc/>
          <text:p text:style-name="a571" text:class-names="" text:cond-style-name=""><text:span text:style-name="a570" text:class-names="">NL sentenc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0299in" svg:y="2.08213in" svg:width="0.28649in" svg:height="0.05in" draw:id="id81" draw:style-name="a579" draw:name="Conector recto 11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87059in" svg:y="2.13213in" svg:width="0.43307in" svg:height="0in" draw:id="id82" draw:style-name="a584" draw:name="Conector recto 12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1215in" svg:y="3.14961in" svg:width="0.98391in" svg:height="0in" draw:id="id83" draw:style-name="a589" draw:name="Conector recto 13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5118in" svg:y="2.44709in" svg:width="0.94488in" svg:height="0.42692in" draw:id="id84" draw:style-name="a594" draw:name="Conector recto 14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59198in" svg:y="2.90576in" svg:width="1.1811in" svg:height="0.7874in" draw:id="id85" draw:style-name="a599" draw:name="Forma libre: forma 18">
          <svg:title/>
          <svg:desc/>
          <text:p text:style-name="a596" text:class-names="" text:cond-style-name=""><text:span text:style-name="a595" text:class-names="">Log DataBase</text:span></text:p>
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88"/>
            <draw:equation draw:name="f6" draw:formula="21600"/>
            <draw:equation draw:name="f7" draw:formula="44"/>
            <draw:equation draw:name="f8" draw:formula="10800"/>
            <draw:equation draw:name="f9" draw:formula="20"/>
            <draw:equation draw:name="f10" draw:formula="68"/>
            <draw:equation draw:name="f11" draw:formula="?f6 - ?f4"/>
            <draw:equation draw:name="f12" draw:formula="?f5 - ?f4"/>
            <draw:equation draw:name="f13" draw:formula="$0"/>
            <draw:equation draw:name="f14" draw:formula="?f12 / 88"/>
            <draw:equation draw:name="f15" draw:formula="?f11 / 21600"/>
            <draw:equation draw:name="f16" draw:formula="?f13 * 2"/>
            <draw:equation draw:name="f17" draw:formula="0 * ?f14"/>
            <draw:equation draw:name="f18" draw:formula="88 * ?f14"/>
            <draw:equation draw:name="f19" draw:formula="44 * ?f14"/>
            <draw:equation draw:name="f20" draw:formula="0 * ?f15"/>
            <draw:equation draw:name="f21" draw:formula="10800 * ?f15"/>
            <draw:equation draw:name="f22" draw:formula="21600 * ?f15"/>
            <draw:equation draw:name="f23" draw:formula="?f16 / 4"/>
            <draw:equation draw:name="f24" draw:formula="?f19 / ?f14"/>
            <draw:equation draw:name="f25" draw:formula="?f20 / ?f15"/>
            <draw:equation draw:name="f26" draw:formula="?f17 / ?f14"/>
            <draw:equation draw:name="f27" draw:formula="?f21 / ?f15"/>
            <draw:equation draw:name="f28" draw:formula="?f22 / ?f15"/>
            <draw:equation draw:name="f29" draw:formula="?f18 / ?f14"/>
            <draw:equation draw:name="f30" draw:formula="?f23 * 6"/>
            <draw:equation draw:name="f31" draw:formula="21600 - ?f23"/>
            <draw:equation draw:name="f32" draw:formula="?f30 / 11"/>
            <draw:equation draw:name="f33" draw:formula="?f23 - ?f32"/>
            <draw:equation draw:name="f34" draw:formula="?f31 + ?f32"/>
            <draw:equation draw:name="f35" draw:formula="?f23 + ?f32"/>
            <draw:equation draw:name="f36" draw:formula="$0 / ?f3"/>
            <draw:handle draw:handle-position="?f24 $0" draw:handle-position-x="?f24" draw:handle-position-y="$0" draw:handle-range-y-minimum="0" draw:handle-range-y-maximum="10800"/>
          </draw:enhanced-geometry>
        </draw:custom-shape>
        <draw:custom-shape svg:x="6.42133in" svg:y="1.83071in" svg:width="1.37795in" svg:height="0.59055in" draw:id="id86" draw:style-name="a604" draw:name="Forma libre: forma 24">
          <svg:title/>
          <svg:desc/>
          <text:p text:style-name="a601" text:class-names="" text:cond-style-name=""><text:span text:style-name="a600" text:class-names="">Temporal Structure Synthesi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8911in" svg:y="2.80142in" svg:width="0.54311in" svg:height="0.42692in" draw:id="id87" draw:style-name="a609" draw:name="Conector recto 29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24043in" svg:y="4.36797in" svg:width="1.71895in" svg:height="0.75907in" draw:id="id88" draw:style-name="a614" draw:name="Forma libre: forma 30">
          <svg:title/>
          <svg:desc/>
          <text:p text:style-name="a611" text:class-names="" text:cond-style-name=""><text:span text:style-name="a610" text:class-names="">LTL Model Chek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7308in" svg:y="3.14961in" svg:width="0.597in" svg:height="0.14986in" draw:id="id89" draw:style-name="a619" draw:name="Conector recto 34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8in" svg:y="2.13213in" svg:width="0.85382in" svg:height="0in" draw:id="id90" draw:style-name="a624" draw:name="Conector recto 35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79928in" svg:y="2.13213in" svg:width="0.43293in" svg:height="0.2618in" draw:id="id91" draw:style-name="a629" draw:name="Conector recto 36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44278in" svg:y="3.39789in" svg:width="1.1811in" svg:height="0.59055in" draw:id="id92" draw:style-name="a634" draw:name="Forma libre: forma 37">
          <svg:title/>
          <svg:desc/>
          <text:p text:style-name="a631" text:class-names="" text:cond-style-name=""><text:span text:style-name="a630" text:class-names="">LTL Formul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86207in" svg:y="2.90576in" svg:width="0.13576in" svg:height="0.49213in" draw:id="id93" draw:style-name="a639" draw:name="Conector recto 3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9.0668in" svg:y="3.98844in" svg:width="0in" svg:height="0.37954in" draw:id="id94" draw:style-name="a644" draw:name="Conector recto 39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5" draw:style-name="a648" draw:name="CuadroTexto 26" svg:x="6.17348in" svg:y="1.63409in" svg:width="5.51293in" svg:height="0.33659in">
          <draw:text-box>
            <text:p text:style-name="a647" text:class-names="" text:cond-style-name=""><text:span text:style-name="a645" text:class-names="">NL to LTL Sem</text:span><text:span text:style-name="a646" text:class-names=""/></text:p>
          </draw:text-box>
          <svg:title/>
          <svg:desc/>
        </draw:frame>
        <draw:custom-shape svg:x="4.95948in" svg:y="3.45632in" svg:width="0.075in" svg:height="0.59055in" draw:id="id96" draw:style-name="a653" draw:name="Conector recto 15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2623in" svg:y="0.52431in" svg:width="1.1811in" svg:height="0.7874in" draw:id="id97" draw:style-name="a658" draw:name="Forma libre: forma 18">
          <svg:title/>
          <svg:desc/>
          <text:p text:style-name="a655" text:class-names="" text:cond-style-name=""><text:span text:style-name="a654" text:class-names="">log.mod</text:span></text:p>
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88"/>
            <draw:equation draw:name="f6" draw:formula="21600"/>
            <draw:equation draw:name="f7" draw:formula="44"/>
            <draw:equation draw:name="f8" draw:formula="10800"/>
            <draw:equation draw:name="f9" draw:formula="20"/>
            <draw:equation draw:name="f10" draw:formula="68"/>
            <draw:equation draw:name="f11" draw:formula="?f6 - ?f4"/>
            <draw:equation draw:name="f12" draw:formula="?f5 - ?f4"/>
            <draw:equation draw:name="f13" draw:formula="$0"/>
            <draw:equation draw:name="f14" draw:formula="?f12 / 88"/>
            <draw:equation draw:name="f15" draw:formula="?f11 / 21600"/>
            <draw:equation draw:name="f16" draw:formula="?f13 * 2"/>
            <draw:equation draw:name="f17" draw:formula="0 * ?f14"/>
            <draw:equation draw:name="f18" draw:formula="88 * ?f14"/>
            <draw:equation draw:name="f19" draw:formula="44 * ?f14"/>
            <draw:equation draw:name="f20" draw:formula="0 * ?f15"/>
            <draw:equation draw:name="f21" draw:formula="10800 * ?f15"/>
            <draw:equation draw:name="f22" draw:formula="21600 * ?f15"/>
            <draw:equation draw:name="f23" draw:formula="?f16 / 4"/>
            <draw:equation draw:name="f24" draw:formula="?f19 / ?f14"/>
            <draw:equation draw:name="f25" draw:formula="?f20 / ?f15"/>
            <draw:equation draw:name="f26" draw:formula="?f17 / ?f14"/>
            <draw:equation draw:name="f27" draw:formula="?f21 / ?f15"/>
            <draw:equation draw:name="f28" draw:formula="?f22 / ?f15"/>
            <draw:equation draw:name="f29" draw:formula="?f18 / ?f14"/>
            <draw:equation draw:name="f30" draw:formula="?f23 * 6"/>
            <draw:equation draw:name="f31" draw:formula="21600 - ?f23"/>
            <draw:equation draw:name="f32" draw:formula="?f30 / 11"/>
            <draw:equation draw:name="f33" draw:formula="?f23 - ?f32"/>
            <draw:equation draw:name="f34" draw:formula="?f31 + ?f32"/>
            <draw:equation draw:name="f35" draw:formula="?f23 + ?f32"/>
            <draw:equation draw:name="f36" draw:formula="$0 / ?f3"/>
            <draw:handle draw:handle-position="?f24 $0" draw:handle-position-x="?f24" draw:handle-position-y="$0" draw:handle-range-y-minimum="0" draw:handle-range-y-maximum="10800"/>
          </draw:enhanced-geometry>
        </draw:custom-shape>
        <draw:custom-shape svg:x="4.67395in" svg:y="1.28657in" svg:width="0.23553in" svg:height="0.5782in" draw:id="id98" draw:style-name="a663" draw:name="Conector recto 15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26744in" svg:y="0.50846in" svg:width="1.1811in" svg:height="0.7874in" draw:id="id99" draw:style-name="a669" draw:name="Forma libre: forma 18">
          <svg:title/>
          <svg:desc/>
          <text:p text:style-name="a666" text:class-names="" text:cond-style-name=""><text:span text:style-name="a664" text:class-names="">LTL Ontology</text:span><text:span text:style-name="a665" text:class-names=""/></text:p>
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88"/>
            <draw:equation draw:name="f6" draw:formula="21600"/>
            <draw:equation draw:name="f7" draw:formula="44"/>
            <draw:equation draw:name="f8" draw:formula="10800"/>
            <draw:equation draw:name="f9" draw:formula="20"/>
            <draw:equation draw:name="f10" draw:formula="68"/>
            <draw:equation draw:name="f11" draw:formula="?f6 - ?f4"/>
            <draw:equation draw:name="f12" draw:formula="?f5 - ?f4"/>
            <draw:equation draw:name="f13" draw:formula="$0"/>
            <draw:equation draw:name="f14" draw:formula="?f12 / 88"/>
            <draw:equation draw:name="f15" draw:formula="?f11 / 21600"/>
            <draw:equation draw:name="f16" draw:formula="?f13 * 2"/>
            <draw:equation draw:name="f17" draw:formula="0 * ?f14"/>
            <draw:equation draw:name="f18" draw:formula="88 * ?f14"/>
            <draw:equation draw:name="f19" draw:formula="44 * ?f14"/>
            <draw:equation draw:name="f20" draw:formula="0 * ?f15"/>
            <draw:equation draw:name="f21" draw:formula="10800 * ?f15"/>
            <draw:equation draw:name="f22" draw:formula="21600 * ?f15"/>
            <draw:equation draw:name="f23" draw:formula="?f16 / 4"/>
            <draw:equation draw:name="f24" draw:formula="?f19 / ?f14"/>
            <draw:equation draw:name="f25" draw:formula="?f20 / ?f15"/>
            <draw:equation draw:name="f26" draw:formula="?f17 / ?f14"/>
            <draw:equation draw:name="f27" draw:formula="?f21 / ?f15"/>
            <draw:equation draw:name="f28" draw:formula="?f22 / ?f15"/>
            <draw:equation draw:name="f29" draw:formula="?f18 / ?f14"/>
            <draw:equation draw:name="f30" draw:formula="?f23 * 6"/>
            <draw:equation draw:name="f31" draw:formula="21600 - ?f23"/>
            <draw:equation draw:name="f32" draw:formula="?f30 / 11"/>
            <draw:equation draw:name="f33" draw:formula="?f23 - ?f32"/>
            <draw:equation draw:name="f34" draw:formula="?f31 + ?f32"/>
            <draw:equation draw:name="f35" draw:formula="?f23 + ?f32"/>
            <draw:equation draw:name="f36" draw:formula="$0 / ?f3"/>
            <draw:handle draw:handle-position="?f24 $0" draw:handle-position-x="?f24" draw:handle-position-y="$0" draw:handle-range-y-minimum="0" draw:handle-range-y-maximum="10800"/>
          </draw:enhanced-geometry>
        </draw:custom-shape>
        <draw:custom-shape svg:x="6.50801in" svg:y="0.50846in" svg:width="1.1811in" svg:height="0.7874in" draw:id="id100" draw:style-name="a675" draw:name="Forma libre: forma 18">
          <svg:title/>
          <svg:desc/>
          <text:p text:style-name="a672" text:class-names="" text:cond-style-name=""><text:span text:style-name="a670" text:class-names="">Log Ontology</text:span><text:span text:style-name="a671" text:class-names=""/></text:p>
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88"/>
            <draw:equation draw:name="f6" draw:formula="21600"/>
            <draw:equation draw:name="f7" draw:formula="44"/>
            <draw:equation draw:name="f8" draw:formula="10800"/>
            <draw:equation draw:name="f9" draw:formula="20"/>
            <draw:equation draw:name="f10" draw:formula="68"/>
            <draw:equation draw:name="f11" draw:formula="?f6 - ?f4"/>
            <draw:equation draw:name="f12" draw:formula="?f5 - ?f4"/>
            <draw:equation draw:name="f13" draw:formula="$0"/>
            <draw:equation draw:name="f14" draw:formula="?f12 / 88"/>
            <draw:equation draw:name="f15" draw:formula="?f11 / 21600"/>
            <draw:equation draw:name="f16" draw:formula="?f13 * 2"/>
            <draw:equation draw:name="f17" draw:formula="0 * ?f14"/>
            <draw:equation draw:name="f18" draw:formula="88 * ?f14"/>
            <draw:equation draw:name="f19" draw:formula="44 * ?f14"/>
            <draw:equation draw:name="f20" draw:formula="0 * ?f15"/>
            <draw:equation draw:name="f21" draw:formula="10800 * ?f15"/>
            <draw:equation draw:name="f22" draw:formula="21600 * ?f15"/>
            <draw:equation draw:name="f23" draw:formula="?f16 / 4"/>
            <draw:equation draw:name="f24" draw:formula="?f19 / ?f14"/>
            <draw:equation draw:name="f25" draw:formula="?f20 / ?f15"/>
            <draw:equation draw:name="f26" draw:formula="?f17 / ?f14"/>
            <draw:equation draw:name="f27" draw:formula="?f21 / ?f15"/>
            <draw:equation draw:name="f28" draw:formula="?f22 / ?f15"/>
            <draw:equation draw:name="f29" draw:formula="?f18 / ?f14"/>
            <draw:equation draw:name="f30" draw:formula="?f23 * 6"/>
            <draw:equation draw:name="f31" draw:formula="21600 - ?f23"/>
            <draw:equation draw:name="f32" draw:formula="?f30 / 11"/>
            <draw:equation draw:name="f33" draw:formula="?f23 - ?f32"/>
            <draw:equation draw:name="f34" draw:formula="?f31 + ?f32"/>
            <draw:equation draw:name="f35" draw:formula="?f23 + ?f32"/>
            <draw:equation draw:name="f36" draw:formula="$0 / ?f3"/>
            <draw:handle draw:handle-position="?f24 $0" draw:handle-position-x="?f24" draw:handle-position-y="$0" draw:handle-range-y-minimum="0" draw:handle-range-y-maximum="10800"/>
          </draw:enhanced-geometry>
        </draw:custom-shape>
        <draw:custom-shape svg:x="5.20733in" svg:y="1.29587in" svg:width="0.59348in" svg:height="0.54426in" draw:id="id101" draw:style-name="a680" draw:name="Conector recto 15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5003in" svg:y="1.27833in" svg:width="1.38653in" svg:height="0.5782in" draw:id="id102" draw:style-name="a685" draw:name="Conector recto 15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731in" svg:y="3.98844in" svg:width="0.71122in" svg:height="0.59055in" draw:id="id103" draw:style-name="a691" draw:name="Forma libre: forma 6">
          <svg:title/>
          <svg:desc/>
          <text:p text:style-name="a688" text:class-names="" text:cond-style-name=""><text:span text:style-name="a686" text:class-names="">LLM</text:span><text:span text:style-name="a6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93656in" svg:y="3.46457in" svg:width="0.05in" svg:height="0.52387in" draw:id="id104" draw:style-name="a696" draw:name="Conector recto 15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39598in" svg:y="3.46457in" svg:width="1.19493in" svg:height="0.55935in" draw:id="id105" draw:style-name="a701" draw:name="Conector recto 15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1697in" svg:y="0.8933in" svg:width="0.71122in" svg:height="0.59055in" draw:id="id106" draw:style-name="a707" draw:name="Forma libre: forma 6">
          <svg:title/>
          <svg:desc/>
          <text:p text:style-name="a704" text:class-names="" text:cond-style-name=""><text:span text:style-name="a702" text:class-names="">LLM</text:span><text:span text:style-name="a7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7058in" svg:y="1.25338in" svg:width="0.68902in" svg:height="0.62782in" draw:id="id107" draw:style-name="a712" draw:name="Conector recto 15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718">
          <draw:frame draw:id="id108" draw:style-name="a715" draw:name="Marcador de número de diapositiva 6" svg:x="4.67953in" svg:y="11.10827in" svg:width="3.5878in" svg:height="0.58425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9" presentation:style-name="a716" draw:name="Marcador de imagen de diapositiva 1">
            <svg:title/>
            <svg:desc/>
          </draw:page-thumbnail>
          <draw:frame draw:id="id110" presentation:style-name="a71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y objetos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os objeto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el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n bl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y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ítulo vertical y texto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63" draw:style="linear" draw:angle="0" draw:start-color="#dde8cb" draw:end-color="#b4c7dc" draw:start-intensity="100%" draw:end-intensity="100%"/>
    <draw:gradient draw:name="a689" draw:style="linear" draw:angle="0" draw:start-color="#dde8cb" draw:end-color="#b4c7dc" draw:start-intensity="100%" draw:end-intensity="100%"/>
    <draw:gradient draw:name="a632" draw:style="linear" draw:angle="0" draw:start-color="#dde8cb" draw:end-color="#b4c7dc" draw:start-intensity="100%" draw:end-intensity="100%"/>
    <draw:gradient draw:name="a673" draw:style="linear" draw:angle="0" draw:start-color="#dde8cb" draw:end-color="#b4c7dc" draw:start-intensity="100%" draw:end-intensity="100%"/>
    <draw:gradient draw:name="a705" draw:style="linear" draw:angle="0" draw:start-color="#dde8cb" draw:end-color="#b4c7dc" draw:start-intensity="100%" draw:end-intensity="100%"/>
    <draw:gradient draw:name="a553" draw:style="linear" draw:angle="0" draw:start-color="#dde8cb" draw:end-color="#b4c7dc" draw:start-intensity="100%" draw:end-intensity="100%"/>
    <draw:gradient draw:name="a558" draw:style="linear" draw:angle="0" draw:start-color="#dde8cb" draw:end-color="#b4c7dc" draw:start-intensity="100%" draw:end-intensity="100%"/>
    <draw:gradient draw:name="a597" draw:style="linear" draw:angle="0" draw:start-color="#dde8cb" draw:end-color="#b4c7dc" draw:start-intensity="100%" draw:end-intensity="100%"/>
    <draw:gradient draw:name="a667" draw:style="linear" draw:angle="0" draw:start-color="#dde8cb" draw:end-color="#b4c7dc" draw:start-intensity="100%" draw:end-intensity="100%"/>
    <draw:gradient draw:name="a543" draw:style="linear" draw:angle="0" draw:start-color="#dde8cb" draw:end-color="#b4c7dc" draw:start-intensity="100%" draw:end-intensity="100%"/>
    <draw:gradient draw:name="a612" draw:style="linear" draw:angle="0" draw:start-color="#dde8cb" draw:end-color="#b4c7dc" draw:start-intensity="100%" draw:end-intensity="100%"/>
    <draw:gradient draw:name="a548" draw:style="linear" draw:angle="0" draw:start-color="#dde8cb" draw:end-color="#b4c7dc" draw:start-intensity="100%" draw:end-intensity="100%"/>
    <draw:gradient draw:name="a656" draw:style="linear" draw:angle="0" draw:start-color="#dde8cb" draw:end-color="#b4c7dc" draw:start-intensity="100%" draw:end-intensity="100%"/>
    <draw:gradient draw:name="a602" draw:style="linear" draw:angle="0" draw:start-color="#dde8cb" draw:end-color="#b4c7dc" draw:start-intensity="100%" draw:end-intensity="100%"/>
    <draw:gradient draw:name="a572" draw:style="linear" draw:angle="0" draw:start-color="#dde8cb" draw:end-color="#b4c7dc" draw:start-intensity="100%" draw:end-intensity="100%"/>
    <draw:gradient draw:name="a538" draw:style="linear" draw:angle="0" draw:start-color="#dde8cb" draw:end-color="#b4c7dc" draw:start-intensity="100%" draw:end-intensity="100%"/>
    <draw:marker draw:name="a700" svg:viewBox="0 0 20 30" svg:d="m10 0-10 30h20z"/>
    <draw:marker draw:name="a638" svg:viewBox="0 0 20 30" svg:d="m10 0-10 30h20z"/>
    <draw:marker draw:name="a679" svg:viewBox="0 0 20 30" svg:d="m10 0-10 30h20z"/>
    <draw:marker draw:name="a623" svg:viewBox="0 0 20 30" svg:d="m10 0-10 30h20z"/>
    <draw:marker draw:name="a662" svg:viewBox="0 0 20 30" svg:d="m10 0-10 30h20z"/>
    <draw:marker draw:name="a593" svg:viewBox="0 0 20 30" svg:d="m10 0-10 30h20z"/>
    <draw:marker draw:name="a628" svg:viewBox="0 0 20 30" svg:d="m10 0-10 30h20z"/>
    <draw:marker draw:name="a583" svg:viewBox="0 0 20 30" svg:d="m10 0-10 30h20z"/>
    <draw:marker draw:name="a652" svg:viewBox="0 0 20 30" svg:d="m10 0-10 30h20z"/>
    <draw:marker draw:name="a618" svg:viewBox="0 0 20 30" svg:d="m10 0-10 30h20z"/>
    <draw:marker draw:name="a588" svg:viewBox="0 0 20 30" svg:d="m10 0-10 30h20z"/>
    <draw:marker draw:name="a695" svg:viewBox="0 0 20 30" svg:d="m10 0-10 30h20z"/>
    <draw:marker draw:name="a711" svg:viewBox="0 0 20 30" svg:d="m10 0-10 30h20z"/>
    <draw:marker draw:name="a643" svg:viewBox="0 0 20 30" svg:d="m10 0-10 30h20z"/>
    <draw:marker draw:name="a608" svg:viewBox="0 0 20 30" svg:d="m10 0-10 30h20z"/>
    <draw:marker draw:name="a684" svg:viewBox="0 0 20 30" svg:d="m10 0-10 30h20z"/>
    <draw:marker draw:name="a578" svg:viewBox="0 0 20 30" svg:d="m10 0-10 30h20z"/>
    <draw:stroke-dash draw:name="a564" draw:style="rect" draw:dots1="1" draw:dots1-length="0in" draw:distance="0in"/>
    <draw:stroke-dash draw:name="a633" draw:style="rect" draw:dots1="1" draw:dots1-length="0in" draw:distance="0in"/>
    <draw:stroke-dash draw:name="a568" draw:style="rect" draw:dots1="1" draw:dots1-length="0in" draw:distance="0in"/>
    <draw:stroke-dash draw:name="a706" draw:style="rect" draw:dots1="1" draw:dots1-length="0in" draw:distance="0in"/>
    <draw:stroke-dash draw:name="a674" draw:style="rect" draw:dots1="1" draw:dots1-length="0in" draw:distance="0in"/>
    <draw:stroke-dash draw:name="a637" draw:style="rect" draw:dots1="1" draw:dots1-length="0in" draw:distance="0in"/>
    <draw:stroke-dash draw:name="a678" draw:style="rect" draw:dots1="1" draw:dots1-length="0in" draw:distance="0in"/>
    <draw:stroke-dash draw:name="a622" draw:style="rect" draw:dots1="1" draw:dots1-length="0in" draw:distance="0in"/>
    <draw:stroke-dash draw:name="a554" draw:style="rect" draw:dots1="1" draw:dots1-length="0in" draw:distance="0in"/>
    <draw:stroke-dash draw:name="a592" draw:style="rect" draw:dots1="1" draw:dots1-length="0in" draw:distance="0in"/>
    <draw:stroke-dash draw:name="a661" draw:style="rect" draw:dots1="1" draw:dots1-length="0in" draw:distance="0in"/>
    <draw:stroke-dash draw:name="a627" draw:style="rect" draw:dots1="1" draw:dots1-length="0in" draw:distance="0in"/>
    <draw:stroke-dash draw:name="a559" draw:style="rect" draw:dots1="1" draw:dots1-length="0in" draw:distance="0in"/>
    <draw:stroke-dash draw:name="a598" draw:style="rect" draw:dots1="1" draw:dots1-length="0in" draw:distance="0in"/>
    <draw:stroke-dash draw:name="a668" draw:style="rect" draw:dots1="1" draw:dots1-length="0in" draw:distance="0in"/>
    <draw:stroke-dash draw:name="a544" draw:style="rect" draw:dots1="1" draw:dots1-length="0in" draw:distance="0in"/>
    <draw:stroke-dash draw:name="a613" draw:style="rect" draw:dots1="1" draw:dots1-length="0in" draw:distance="0in"/>
    <draw:stroke-dash draw:name="a582" draw:style="rect" draw:dots1="1" draw:dots1-length="0in" draw:distance="0in"/>
    <draw:stroke-dash draw:name="a651" draw:style="rect" draw:dots1="1" draw:dots1-length="0in" draw:distance="0in"/>
    <draw:stroke-dash draw:name="a690" draw:style="rect" draw:dots1="1" draw:dots1-length="0in" draw:distance="0in"/>
    <draw:stroke-dash draw:name="a617" draw:style="rect" draw:dots1="1" draw:dots1-length="0in" draw:distance="0in"/>
    <draw:stroke-dash draw:name="a549" draw:style="rect" draw:dots1="1" draw:dots1-length="0in" draw:distance="0in"/>
    <draw:stroke-dash draw:name="a587" draw:style="rect" draw:dots1="1" draw:dots1-length="0in" draw:distance="0in"/>
    <draw:stroke-dash draw:name="a657" draw:style="rect" draw:dots1="1" draw:dots1-length="0in" draw:distance="0in"/>
    <draw:stroke-dash draw:name="a694" draw:style="rect" draw:dots1="1" draw:dots1-length="0in" draw:distance="0in"/>
    <draw:stroke-dash draw:name="a603" draw:style="rect" draw:dots1="1" draw:dots1-length="0in" draw:distance="0in"/>
    <draw:stroke-dash draw:name="a710" draw:style="rect" draw:dots1="1" draw:dots1-length="0in" draw:distance="0in"/>
    <draw:stroke-dash draw:name="a573" draw:style="rect" draw:dots1="1" draw:dots1-length="0in" draw:distance="0in"/>
    <draw:stroke-dash draw:name="a699" draw:style="rect" draw:dots1="1" draw:dots1-length="0in" draw:distance="0in"/>
    <draw:stroke-dash draw:name="a642" draw:style="rect" draw:dots1="1" draw:dots1-length="0in" draw:distance="0in"/>
    <draw:stroke-dash draw:name="a607" draw:style="rect" draw:dots1="1" draw:dots1-length="0in" draw:distance="0in"/>
    <draw:stroke-dash draw:name="a539" draw:style="rect" draw:dots1="1" draw:dots1-length="0in" draw:distance="0in"/>
    <draw:stroke-dash draw:name="a577" draw:style="rect" draw:dots1="1" draw:dots1-length="0in" draw:distance="0in"/>
    <draw:stroke-dash draw:name="a683" draw:style="rect" draw:dots1="1" draw:dots1-length="0in" draw:distance="0in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Marcador de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0" draw:name="Título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2" presentation:style-name="a53" draw:name="Subtítulo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Haga clic para modificar el estilo de subtítulo del patrón</text:span></text:p>
        </draw:text-box>
        <svg:title/>
        <svg:desc/>
      </draw:frame>
      <draw:frame draw:id="id13" presentation:style-name="a56" draw:name="Marcador de fecha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Marcador de pie de página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Marcador de número de diapositiva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Marcador de imagen de diapositiva 1">
          <svg:title/>
          <svg:desc/>
        </draw:page-thumbnail>
        <draw:frame draw:id="id6" presentation:style-name="a66" draw:name="Marcador de notas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Marcador de encabezado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Marcador de fecha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Marcador de pie de página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Marcador de número de diapositiva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0">
      <draw:frame draw:id="id16" presentation:style-name="a83" draw:name="Título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Haga clic para modificar el estilo de título del patrón</text:span></text:p>
        </draw:text-box>
        <svg:title/>
        <svg:desc/>
      </draw:frame>
      <draw:frame draw:id="id17" presentation:style-name="a98" draw:name="Marcador de contenido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Haga clic para modificar los estilos de texto del patrón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gundo ni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Marcador de fecha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Marcador de pie de página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Marcador de número de diapositiva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Marcador de imagen de diapositiva 1">
          <svg:title/>
          <svg:desc/>
        </draw:page-thumbnail>
        <draw:frame draw:id="id6" presentation:style-name="a111" draw:name="Marcador de notas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Marcador de encabezado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Marcador de fecha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Marcador de pie de página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Marcador de número de diapositiva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5">
      <draw:frame draw:id="id21" presentation:style-name="a128" draw:name="Título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Haga clic para modificar el estilo de título del patrón</text:span></text:p>
        </draw:text-box>
        <svg:title/>
        <svg:desc/>
      </draw:frame>
      <draw:frame draw:id="id22" presentation:style-name="a132" draw:name="Marcador de texto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5" draw:name="Marcador de fecha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Marcador de pie de página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Marcador de número de diapositiva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Marcador de imagen de diapositiva 1">
          <svg:title/>
          <svg:desc/>
        </draw:page-thumbnail>
        <draw:frame draw:id="id6" presentation:style-name="a145" draw:name="Marcador de notas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Marcador de encabezado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Marcador de fecha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Marcador de pie de página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Marcador de número de diapositiva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9">
      <draw:frame draw:id="id26" presentation:style-name="a162" draw:name="Título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Haga clic para modificar el estilo de título del patrón</text:span></text:p>
        </draw:text-box>
        <svg:title/>
        <svg:desc/>
      </draw:frame>
      <draw:frame draw:id="id27" presentation:style-name="a177" draw:name="Marcador de contenido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Haga clic para modificar los estilos de texto del patrón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gundo ni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Marcador de contenido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Haga clic para modificar los estilos de texto del patrón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gundo ni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Marcador de fecha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Marcador de pie de página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Marcador de número de diapositiva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Marcador de imagen de diapositiva 1">
          <svg:title/>
          <svg:desc/>
        </draw:page-thumbnail>
        <draw:frame draw:id="id6" presentation:style-name="a205" draw:name="Marcador de notas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Marcador de encabezado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Marcador de fecha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Marcador de pie de página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Marcador de número de diapositiva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9">
      <draw:frame draw:id="id32" presentation:style-name="a222" draw:name="Título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Haga clic para modificar el estilo de título del patrón</text:span></text:p>
        </draw:text-box>
        <svg:title/>
        <svg:desc/>
      </draw:frame>
      <draw:frame draw:id="id33" presentation:style-name="a226" draw:name="Marcador de texto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1" draw:name="Marcador de contenido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Haga clic para modificar los estilos de texto del patrón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gundo ni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Marcador de texto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0" draw:name="Marcador de contenido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Haga clic para modificar los estilos de texto del patró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i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Marcador de fecha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Marcador de pie de página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Marcador de número de diapositiva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Marcador de imagen de diapositiva 1">
          <svg:title/>
          <svg:desc/>
        </draw:page-thumbnail>
        <draw:frame draw:id="id6" presentation:style-name="a273" draw:name="Marcador de notas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Marcador de encabezado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Marcador de fecha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Marcador de pie de página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Marcador de número de diapositiva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7">
      <draw:frame draw:id="id40" presentation:style-name="a290" draw:name="Título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Haga clic para modificar el estilo de título del patrón</text:span></text:p>
        </draw:text-box>
        <svg:title/>
        <svg:desc/>
      </draw:frame>
      <draw:frame draw:id="id41" presentation:style-name="a293" draw:name="Marcador de fecha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Marcador de pie de página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Marcador de número de diapositiva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Marcador de imagen de diapositiva 1">
          <svg:title/>
          <svg:desc/>
        </draw:page-thumbnail>
        <draw:frame draw:id="id6" presentation:style-name="a303" draw:name="Marcador de notas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Marcador de encabezado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Marcador de fecha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Marcador de pie de página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Marcador de número de diapositiva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7">
      <draw:frame draw:id="id44" presentation:style-name="a320" draw:name="Marcador de fecha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Marcador de pie de página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Marcador de número de diapositiva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Marcador de imagen de diapositiva 1">
          <svg:title/>
          <svg:desc/>
        </draw:page-thumbnail>
        <draw:frame draw:id="id6" presentation:style-name="a330" draw:name="Marcador de notas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Marcador de encabezado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Marcador de fecha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Marcador de pie de página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Marcador de número de diapositiva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4">
      <draw:frame draw:id="id47" presentation:style-name="a347" draw:name="Título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Haga clic para modificar el estilo de título del patrón</text:span></text:p>
        </draw:text-box>
        <svg:title/>
        <svg:desc/>
      </draw:frame>
      <draw:frame draw:id="id48" presentation:style-name="a362" draw:name="Marcador de contenido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Haga clic para modificar los estilos de texto del patrón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gundo ni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6" draw:name="Título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Haga clic para modificar el estilo de título del patrón</text:span></text:p>
        </draw:text-box>
        <svg:title/>
        <svg:desc/>
      </draw:frame>
      <draw:frame draw:id="id54" presentation:style-name="a399" draw:name="Marcador de posición de imagen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Marcador de texto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06" draw:name="Marcador de fecha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Marcador de pie de página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Marcador de número de diapositiva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Marcador de imagen de diapositiva 1">
          <svg:title/>
          <svg:desc/>
        </draw:page-thumbnail>
        <draw:frame draw:id="id6" presentation:style-name="a416" draw:name="Marcador de notas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Marcador de encabezado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Marcador de fecha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Marcador de pie de página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Marcador de número de diapositiva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0">
      <draw:frame draw:id="id59" presentation:style-name="a433" draw:name="Título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Haga clic para modificar el estilo de título del patrón</text:span></text:p>
        </draw:text-box>
        <svg:title/>
        <svg:desc/>
      </draw:frame>
      <draw:frame draw:id="id60" presentation:style-name="a449" draw:name="Marcador de texto vertical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Haga clic para modificar los estilos de texto del patrón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gundo ni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Marcador de fecha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Marcador de pie de página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Marcador de número de diapositiva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Marcador de imagen de diapositiva 1">
          <svg:title/>
          <svg:desc/>
        </draw:page-thumbnail>
        <draw:frame draw:id="id6" presentation:style-name="a462" draw:name="Marcador de notas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Marcador de encabezado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Marcador de fecha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Marcador de pie de página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Marcador de número de diapositiva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6">
      <draw:frame draw:id="id64" presentation:style-name="a479" draw:name="Título vertical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Haga clic para modificar el estilo de título del patrón</text:span></text:p>
        </draw:text-box>
        <svg:title/>
        <svg:desc/>
      </draw:frame>
      <draw:frame draw:id="id65" presentation:style-name="a495" draw:name="Marcador de texto vertical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Haga clic para modificar los estilos de texto del patrón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gundo ni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Marcador de fecha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Marcador de pie de página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Marcador de número de diapositiva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Marcador de imagen de diapositiva 1">
          <svg:title/>
          <svg:desc/>
        </draw:page-thumbnail>
        <draw:frame draw:id="id6" presentation:style-name="a508" draw:name="Marcador de notas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Marcador de encabezado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Marcador de fecha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Marcador de pie de página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Marcador de número de diapositiva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Marcador de encabezado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Marcador de fecha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Marcador de pie de página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Marcador de número de diapositiva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initial-creator>MariJose</meta:initial-creator>
    <dc:creator>María José Ibáñez Sáenz-López</dc:creator>
    <meta:creation-date>2026-03-26T10:55:10Z</meta:creation-date>
    <dc:date>2026-04-24T11:34:31Z</dc:date>
    <meta:editing-cycles>14</meta:editing-cycles>
    <meta:editing-duration>PT9047S</meta:editing-duration>
    <meta:document-statistic meta:paragraph-count="18" meta:word-count="39"/>
  </office:meta>
</office:document-meta>
</file>